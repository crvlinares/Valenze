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roman" svg:panose-1="0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margin-top="3.8194in"/>
    </style:style>
    <style:style style:name="P3" style:parent-style-name="Normal" style:family="paragraph">
      <style:paragraph-properties fo:margin-left="0.8333in" fo:margin-right="0.8333in">
        <style:tab-stops/>
      </style:paragraph-properties>
    </style:style>
    <style:style style:name="T4" style:parent-style-name="Fuentedepárrafopredeter." style:family="text">
      <style:text-properties fo:font-weight="bold" style:font-weight-asian="bold" fo:color="#FFFFFF" fo:letter-spacing="0.0208in" fo:font-size="36pt" style:font-size-asian="36pt" fo:language="en" fo:country="GB"/>
    </style:style>
    <style:style style:name="P5" style:parent-style-name="Normal" style:family="paragraph">
      <style:paragraph-properties fo:margin-bottom="0.4166in" fo:margin-left="0.8333in" fo:margin-right="0.8333in">
        <style:tab-stops/>
      </style:paragraph-properties>
    </style:style>
    <style:style style:name="T6" style:parent-style-name="Fuentedepárrafopredeter." style:family="text">
      <style:text-properties fo:color="#C0392B" fo:letter-spacing="0.0277in" fo:font-size="28pt" style:font-size-asian="28pt" fo:language="en" fo:country="GB"/>
    </style:style>
    <style:style style:name="P7" style:parent-style-name="Normal" style:family="paragraph">
      <style:paragraph-properties fo:margin-bottom="2.0833in" fo:margin-left="0.8333in" fo:margin-right="0.8333in">
        <style:tab-stops/>
      </style:paragraph-properties>
    </style:style>
    <style:style style:name="T8" style:parent-style-name="Fuentedepárrafopredeter." style:family="text">
      <style:text-properties fo:color="#8A95A5" fo:letter-spacing="0.0138in" fo:font-size="12pt" style:font-size-asian="12pt" fo:language="en" fo:country="GB"/>
    </style:style>
    <style:style style:name="P9" style:parent-style-name="Normal" style:family="paragraph">
      <style:paragraph-properties fo:margin-left="0.8333in">
        <style:tab-stops/>
      </style:paragraph-properties>
    </style:style>
    <style:style style:name="T10" style:parent-style-name="Fuentedepárrafopredeter." style:family="text">
      <style:text-properties fo:color="#8A95A5" fo:font-size="10pt" style:font-size-asian="10pt" fo:language="en" fo:country="GB"/>
    </style:style>
    <style:style style:name="P11" style:parent-style-name="Normal" style:family="paragraph">
      <style:paragraph-properties fo:margin-left="0.8333in">
        <style:tab-stops/>
      </style:paragraph-properties>
    </style:style>
    <style:style style:name="T12" style:parent-style-name="Fuentedepárrafopredeter." style:family="text">
      <style:text-properties fo:color="#C0392B" fo:font-size="10pt" style:font-size-asian="10pt" fo:language="en" fo:country="GB"/>
    </style:style>
    <style:style style:name="P13" style:parent-style-name="Normal" style:master-page-name="MP1" style:family="paragraph">
      <style:paragraph-properties fo:break-before="page" fo:margin-top="0.2777in" fo:margin-bottom="0.2083in"/>
    </style:style>
    <style:style style:name="T14" style:parent-style-name="Fuentedepárrafopredeter." style:family="text">
      <style:text-properties fo:font-weight="bold" style:font-weight-asian="bold" fo:color="#3A5068" fo:font-size="18pt" style:font-size-asian="18pt" fo:language="en" fo:country="GB"/>
    </style:style>
    <style:style style:name="P15" style:parent-style-name="Normal" style:family="paragraph">
      <style:paragraph-properties fo:margin-bottom="0.2083in"/>
    </style:style>
    <style:style style:name="T16" style:parent-style-name="Fuentedepárrafopredeter." style:family="text">
      <style:text-properties fo:color="#8A95A5" fo:font-size="9pt" style:font-size-asian="9pt" fo:language="en" fo:country="GB"/>
    </style:style>
    <style:style style:name="P17" style:parent-style-name="Título1" style:master-page-name="MP2" style:family="paragraph">
      <style:paragraph-properties fo:break-before="page"/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paragraph-properties fo:border-top="none" fo:border-left="0.0416in solid #C0392B" fo:border-bottom="none" fo:border-right="none" fo:padding="0in" style:shadow="none" fo:margin-top="0.1388in" fo:margin-left="0.25in" fo:margin-right="0.25in" fo:background-color="#FEE2E2">
        <style:tab-stops/>
        <style:background-fill draw:fill="solid" draw:fill-color="#FEE2E2"/>
      </style:paragraph-properties>
    </style:style>
    <style:style style:name="T26" style:parent-style-name="Fuentedepárrafopredeter." style:family="text">
      <style:text-properties fo:font-weight="bold" style:font-weight-asian="bold" fo:color="#C0392B" fo:language="en" fo:country="GB"/>
    </style:style>
    <style:style style:name="T27" style:parent-style-name="Fuentedepárrafopredeter." style:family="text">
      <style:text-properties fo:language="en" fo:country="GB"/>
    </style:style>
    <style:style style:name="P28" style:parent-style-name="Título2" style:family="paragraph">
      <style:text-properties fo:language="en" fo:country="GB"/>
    </style:style>
    <style:style style:name="P2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30" style:parent-style-name="Fuentedepárrafopredeter." style:family="text">
      <style:text-properties fo:color="#4A5568" fo:language="en" fo:country="GB"/>
    </style:style>
    <style:style style:name="P3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32" style:parent-style-name="Fuentedepárrafopredeter." style:family="text">
      <style:text-properties fo:color="#4A5568" fo:language="en" fo:country="GB"/>
    </style:style>
    <style:style style:name="P3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34" style:parent-style-name="Fuentedepárrafopredeter." style:family="text">
      <style:text-properties fo:color="#4A5568" fo:language="en" fo:country="GB"/>
    </style:style>
    <style:style style:name="P3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36" style:parent-style-name="Fuentedepárrafopredeter." style:family="text">
      <style:text-properties fo:color="#4A5568" fo:language="en" fo:country="GB"/>
    </style:style>
    <style:style style:name="P3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38" style:parent-style-name="Fuentedepárrafopredeter." style:family="text">
      <style:text-properties fo:color="#4A5568" fo:language="en" fo:country="GB"/>
    </style:style>
    <style:style style:name="TableColumn40" style:family="table-column">
      <style:table-column-properties style:column-width="1.9965in"/>
    </style:style>
    <style:style style:name="TableColumn41" style:family="table-column">
      <style:table-column-properties style:column-width="1.3256in"/>
    </style:style>
    <style:style style:name="TableColumn42" style:family="table-column">
      <style:table-column-properties style:column-width="2.9458in"/>
    </style:style>
    <style:style style:name="Table39" style:family="table">
      <style:table-properties style:width="6.268in" style:rel-width="100%" fo:margin-left="0.0069in" table:align="left"/>
    </style:style>
    <style:style style:name="TableRow43" style:family="table-row">
      <style:table-row-properties/>
    </style:style>
    <style:style style:name="TableCell44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45" style:parent-style-name="Normal" style:family="paragraph">
      <style:paragraph-properties fo:margin-top="0.0416in" fo:margin-bottom="0.0416in"/>
    </style:style>
    <style:style style:name="T46" style:parent-style-name="Fuentedepárrafopredeter." style:family="text">
      <style:text-properties fo:font-weight="bold" style:font-weight-asian="bold" fo:font-size="10pt" style:font-size-asian="10pt"/>
    </style:style>
    <style:style style:name="TableCell47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48" style:parent-style-name="Normal" style:family="paragraph">
      <style:paragraph-properties fo:margin-top="0.0416in" fo:margin-bottom="0.0416in"/>
    </style:style>
    <style:style style:name="T49" style:parent-style-name="Fuentedepárrafopredeter." style:family="text">
      <style:text-properties fo:font-weight="bold" style:font-weight-asian="bold" fo:font-size="10pt" style:font-size-asian="10pt"/>
    </style:style>
    <style:style style:name="TableCell50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51" style:parent-style-name="Normal" style:family="paragraph">
      <style:paragraph-properties fo:margin-top="0.0416in" fo:margin-bottom="0.0416in"/>
    </style:style>
    <style:style style:name="T52" style:parent-style-name="Fuentedepárrafopredeter." style:family="text">
      <style:text-properties fo:font-weight="bold" style:font-weight-asian="bold" fo:font-size="10pt" style:font-size-asian="10pt"/>
    </style:style>
    <style:style style:name="TableRow53" style:family="table-row">
      <style:table-row-properties/>
    </style:style>
    <style:style style:name="TableCell54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margin-top="0.0416in" fo:margin-bottom="0.0416in"/>
    </style:style>
    <style:style style:name="T56" style:parent-style-name="Fuentedepárrafopredeter." style:family="text">
      <style:text-properties fo:color="#4A5568" fo:font-size="10pt" style:font-size-asian="10pt"/>
    </style:style>
    <style:style style:name="TableCell57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margin-top="0.0416in" fo:margin-bottom="0.0416in"/>
    </style:style>
    <style:style style:name="T59" style:parent-style-name="Fuentedepárrafopredeter." style:family="text">
      <style:text-properties fo:color="#4A5568" fo:font-size="10pt" style:font-size-asian="10pt"/>
    </style:style>
    <style:style style:name="TableCell60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top="0.0416in" fo:margin-bottom="0.0416in"/>
    </style:style>
    <style:style style:name="T62" style:parent-style-name="Fuentedepárrafopredeter." style:family="text">
      <style:text-properties fo:color="#4A5568" fo:font-size="10pt" style:font-size-asian="10p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margin-top="0.0416in" fo:margin-bottom="0.0416in"/>
    </style:style>
    <style:style style:name="T66" style:parent-style-name="Fuentedepárrafopredeter." style:family="text">
      <style:text-properties fo:color="#4A5568" fo:font-size="10pt" style:font-size-asian="10pt"/>
    </style:style>
    <style:style style:name="TableCell67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margin-top="0.0416in" fo:margin-bottom="0.0416in"/>
    </style:style>
    <style:style style:name="T69" style:parent-style-name="Fuentedepárrafopredeter." style:family="text">
      <style:text-properties fo:color="#4A5568" fo:font-size="10pt" style:font-size-asian="10pt"/>
    </style:style>
    <style:style style:name="TableCell70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top="0.0416in" fo:margin-bottom="0.0416in"/>
    </style:style>
    <style:style style:name="T72" style:parent-style-name="Fuentedepárrafopredeter." style:family="text">
      <style:text-properties fo:color="#4A5568" fo:font-size="10pt" style:font-size-asian="10pt" fo:language="en" fo:country="GB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margin-top="0.0416in" fo:margin-bottom="0.0416in"/>
    </style:style>
    <style:style style:name="T76" style:parent-style-name="Fuentedepárrafopredeter." style:family="text">
      <style:text-properties fo:color="#4A5568" fo:font-size="10pt" style:font-size-asian="10pt"/>
    </style:style>
    <style:style style:name="TableCell77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top="0.0416in" fo:margin-bottom="0.0416in"/>
    </style:style>
    <style:style style:name="T79" style:parent-style-name="Fuentedepárrafopredeter." style:family="text">
      <style:text-properties fo:color="#4A5568" fo:font-size="10pt" style:font-size-asian="10pt"/>
    </style:style>
    <style:style style:name="TableCell80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margin-top="0.0416in" fo:margin-bottom="0.0416in"/>
    </style:style>
    <style:style style:name="T82" style:parent-style-name="Fuentedepárrafopredeter." style:family="text">
      <style:text-properties fo:color="#4A5568" fo:font-size="10pt" style:font-size-asian="10pt"/>
    </style:style>
    <style:style style:name="TableRow83" style:family="table-row">
      <style:table-row-properties/>
    </style:style>
    <style:style style:name="TableCell84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margin-top="0.0416in" fo:margin-bottom="0.0416in"/>
    </style:style>
    <style:style style:name="T86" style:parent-style-name="Fuentedepárrafopredeter." style:family="text">
      <style:text-properties fo:color="#4A5568" fo:font-size="10pt" style:font-size-asian="10pt"/>
    </style:style>
    <style:style style:name="TableCell87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margin-top="0.0416in" fo:margin-bottom="0.0416in"/>
    </style:style>
    <style:style style:name="T89" style:parent-style-name="Fuentedepárrafopredeter." style:family="text">
      <style:text-properties fo:color="#4A5568" fo:font-size="10pt" style:font-size-asian="10pt"/>
    </style:style>
    <style:style style:name="TableCell90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top="0.0416in" fo:margin-bottom="0.0416in"/>
    </style:style>
    <style:style style:name="T92" style:parent-style-name="Fuentedepárrafopredeter." style:family="text">
      <style:text-properties fo:color="#4A5568" fo:font-size="10pt" style:font-size-asian="10pt"/>
    </style:style>
    <style:style style:name="TableRow93" style:family="table-row">
      <style:table-row-properties/>
    </style:style>
    <style:style style:name="TableCell94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margin-top="0.0416in" fo:margin-bottom="0.0416in"/>
    </style:style>
    <style:style style:name="T96" style:parent-style-name="Fuentedepárrafopredeter." style:family="text">
      <style:text-properties fo:color="#4A5568" fo:font-size="10pt" style:font-size-asian="10pt"/>
    </style:style>
    <style:style style:name="TableCell97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margin-top="0.0416in" fo:margin-bottom="0.0416in"/>
    </style:style>
    <style:style style:name="T99" style:parent-style-name="Fuentedepárrafopredeter." style:family="text">
      <style:text-properties fo:color="#4A5568" fo:font-size="10pt" style:font-size-asian="10pt"/>
    </style:style>
    <style:style style:name="TableCell100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margin-top="0.0416in" fo:margin-bottom="0.0416in"/>
    </style:style>
    <style:style style:name="T102" style:parent-style-name="Fuentedepárrafopredeter." style:family="text">
      <style:text-properties fo:color="#4A5568" fo:font-size="10pt" style:font-size-asian="10pt"/>
    </style:style>
    <style:style style:name="TableRow103" style:family="table-row">
      <style:table-row-properties/>
    </style:style>
    <style:style style:name="TableCell104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top="0.0416in" fo:margin-bottom="0.0416in"/>
    </style:style>
    <style:style style:name="T106" style:parent-style-name="Fuentedepárrafopredeter." style:family="text">
      <style:text-properties fo:color="#4A5568" fo:font-size="10pt" style:font-size-asian="10pt"/>
    </style:style>
    <style:style style:name="TableCell107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margin-top="0.0416in" fo:margin-bottom="0.0416in"/>
    </style:style>
    <style:style style:name="T109" style:parent-style-name="Fuentedepárrafopredeter." style:family="text">
      <style:text-properties fo:color="#4A5568" fo:font-size="10pt" style:font-size-asian="10pt"/>
    </style:style>
    <style:style style:name="TableCell110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margin-top="0.0416in" fo:margin-bottom="0.0416in"/>
    </style:style>
    <style:style style:name="T112" style:parent-style-name="Fuentedepárrafopredeter." style:family="text">
      <style:text-properties fo:color="#4A5568" fo:font-size="10pt" style:font-size-asian="10pt"/>
    </style:style>
    <style:style style:name="P113" style:parent-style-name="Normal" style:family="paragraph">
      <style:text-properties fo:language="en" fo:country="GB"/>
    </style:style>
    <style:style style:name="P114" style:parent-style-name="Título2" style:family="paragraph">
      <style:text-properties fo:language="en" fo:country="GB"/>
    </style:style>
    <style:style style:name="P115" style:parent-style-name="Normal" style:family="paragraph">
      <style:paragraph-properties fo:border-top="none" fo:border-left="0.0416in solid #C0392B" fo:border-bottom="none" fo:border-right="none" fo:padding="0in" style:shadow="none" fo:margin-top="0.1388in" fo:margin-left="0.25in" fo:margin-right="0.25in" fo:background-color="#FEE2E2">
        <style:tab-stops/>
        <style:background-fill draw:fill="solid" draw:fill-color="#FEE2E2"/>
      </style:paragraph-properties>
    </style:style>
    <style:style style:name="T116" style:parent-style-name="Fuentedepárrafopredeter." style:family="text">
      <style:text-properties fo:font-weight="bold" style:font-weight-asian="bold" fo:color="#C0392B" fo:language="en" fo:country="GB"/>
    </style:style>
    <style:style style:name="T117" style:parent-style-name="Fuentedepárrafopredeter." style:family="text">
      <style:text-properties fo:language="en" fo:country="GB"/>
    </style:style>
    <style:style style:name="P11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19" style:parent-style-name="Fuentedepárrafopredeter." style:family="text">
      <style:text-properties fo:color="#4A5568" fo:language="en" fo:country="GB"/>
    </style:style>
    <style:style style:name="P120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21" style:parent-style-name="Fuentedepárrafopredeter." style:family="text">
      <style:text-properties fo:color="#4A5568" fo:language="en" fo:country="GB"/>
    </style:style>
    <style:style style:name="P122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23" style:parent-style-name="Fuentedepárrafopredeter." style:family="text">
      <style:text-properties fo:color="#4A5568" fo:language="en" fo:country="GB"/>
    </style:style>
    <style:style style:name="P124" style:parent-style-name="Título2" style:family="paragraph">
      <style:text-properties fo:language="en" fo:country="GB"/>
    </style:style>
    <style:style style:name="P125" style:parent-style-name="Normal" style:family="paragraph">
      <style:paragraph-properties fo:border-top="none" fo:border-left="0.0416in solid #C0392B" fo:border-bottom="none" fo:border-right="none" fo:padding="0in" style:shadow="none" fo:margin-top="0.1388in" fo:margin-left="0.25in" fo:margin-right="0.25in" fo:background-color="#FEE2E2">
        <style:tab-stops/>
        <style:background-fill draw:fill="solid" draw:fill-color="#FEE2E2"/>
      </style:paragraph-properties>
    </style:style>
    <style:style style:name="T126" style:parent-style-name="Fuentedepárrafopredeter." style:family="text">
      <style:text-properties fo:font-weight="bold" style:font-weight-asian="bold" fo:color="#C0392B" fo:language="en" fo:country="GB"/>
    </style:style>
    <style:style style:name="T127" style:parent-style-name="Fuentedepárrafopredeter." style:family="text">
      <style:text-properties fo:language="en" fo:country="GB"/>
    </style:style>
    <style:style style:name="P12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29" style:parent-style-name="Fuentedepárrafopredeter." style:family="text">
      <style:text-properties fo:color="#4A5568" fo:language="en" fo:country="GB"/>
    </style:style>
    <style:style style:name="P130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31" style:parent-style-name="Fuentedepárrafopredeter." style:family="text">
      <style:text-properties fo:color="#4A5568" fo:language="en" fo:country="GB"/>
    </style:style>
    <style:style style:name="P132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33" style:parent-style-name="Fuentedepárrafopredeter." style:family="text">
      <style:text-properties fo:color="#4A5568" fo:language="en" fo:country="GB"/>
    </style:style>
    <style:style style:name="P134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35" style:parent-style-name="Fuentedepárrafopredeter." style:family="text">
      <style:text-properties fo:color="#4A5568" fo:language="en" fo:country="GB"/>
    </style:style>
    <style:style style:name="P136" style:parent-style-name="Título2" style:family="paragraph">
      <style:text-properties fo:language="en" fo:country="GB"/>
    </style:style>
    <style:style style:name="P13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38" style:parent-style-name="Fuentedepárrafopredeter." style:family="text">
      <style:text-properties fo:color="#4A5568" fo:language="en" fo:country="GB"/>
    </style:style>
    <style:style style:name="P13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40" style:parent-style-name="Fuentedepárrafopredeter." style:family="text">
      <style:text-properties fo:color="#4A5568" fo:language="en" fo:country="GB"/>
    </style:style>
    <style:style style:name="P14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42" style:parent-style-name="Fuentedepárrafopredeter." style:family="text">
      <style:text-properties fo:color="#4A5568" fo:language="en" fo:country="GB"/>
    </style:style>
    <style:style style:name="P14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44" style:parent-style-name="Fuentedepárrafopredeter." style:family="text">
      <style:text-properties fo:color="#4A5568" fo:language="en" fo:country="GB"/>
    </style:style>
    <style:style style:name="P145" style:parent-style-name="Título1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  <style:style style:name="P147" style:parent-style-name="Título2" style:family="paragraph">
      <style:text-properties fo:language="en" fo:country="GB"/>
    </style:style>
    <style:style style:name="P14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49" style:parent-style-name="Fuentedepárrafopredeter." style:family="text">
      <style:text-properties fo:color="#4A5568" fo:language="en" fo:country="GB"/>
    </style:style>
    <style:style style:name="P150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51" style:parent-style-name="Fuentedepárrafopredeter." style:family="text">
      <style:text-properties fo:color="#4A5568" fo:language="en" fo:country="GB"/>
    </style:style>
    <style:style style:name="P152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53" style:parent-style-name="Fuentedepárrafopredeter." style:family="text">
      <style:text-properties fo:color="#4A5568" fo:language="en" fo:country="GB"/>
    </style:style>
    <style:style style:name="P154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55" style:parent-style-name="Fuentedepárrafopredeter." style:family="text">
      <style:text-properties fo:color="#4A5568" fo:language="en" fo:country="GB"/>
    </style:style>
    <style:style style:name="P156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57" style:parent-style-name="Fuentedepárrafopredeter." style:family="text">
      <style:text-properties fo:color="#4A5568" fo:language="en" fo:country="GB"/>
    </style:style>
    <style:style style:name="P15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59" style:parent-style-name="Fuentedepárrafopredeter." style:family="text">
      <style:text-properties fo:color="#4A5568" fo:language="en" fo:country="GB"/>
    </style:style>
    <style:style style:name="P160" style:parent-style-name="Título2" style:family="paragraph">
      <style:text-properties fo:language="en" fo:country="GB"/>
    </style:style>
    <style:style style:name="P161" style:parent-style-name="Normal" style:family="paragraph">
      <style:text-properties fo:language="en" fo:country="GB"/>
    </style:style>
    <style:style style:name="P162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63" style:parent-style-name="Fuentedepárrafopredeter." style:family="text">
      <style:text-properties fo:color="#4A5568" fo:language="en" fo:country="GB"/>
    </style:style>
    <style:style style:name="P164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65" style:parent-style-name="Fuentedepárrafopredeter." style:family="text">
      <style:text-properties fo:color="#4A5568" fo:language="en" fo:country="GB"/>
    </style:style>
    <style:style style:name="P166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67" style:parent-style-name="Fuentedepárrafopredeter." style:family="text">
      <style:text-properties fo:color="#4A5568" fo:language="en" fo:country="GB"/>
    </style:style>
    <style:style style:name="P16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69" style:parent-style-name="Fuentedepárrafopredeter." style:family="text">
      <style:text-properties fo:color="#4A5568" fo:language="en" fo:country="GB"/>
    </style:style>
    <style:style style:name="P170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71" style:parent-style-name="Fuentedepárrafopredeter." style:family="text">
      <style:text-properties fo:color="#4A5568" fo:language="en" fo:country="GB"/>
    </style:style>
    <style:style style:name="P172" style:parent-style-name="Título2" style:family="paragraph">
      <style:text-properties fo:language="en" fo:country="GB"/>
    </style:style>
    <style:style style:name="P17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74" style:parent-style-name="Fuentedepárrafopredeter." style:family="text">
      <style:text-properties fo:color="#4A5568" fo:language="en" fo:country="GB"/>
    </style:style>
    <style:style style:name="P17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76" style:parent-style-name="Fuentedepárrafopredeter." style:family="text">
      <style:text-properties fo:color="#4A5568" fo:language="en" fo:country="GB"/>
    </style:style>
    <style:style style:name="P17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78" style:parent-style-name="Fuentedepárrafopredeter." style:family="text">
      <style:text-properties fo:color="#4A5568" fo:language="en" fo:country="GB"/>
    </style:style>
    <style:style style:name="P17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80" style:parent-style-name="Fuentedepárrafopredeter." style:family="text">
      <style:text-properties fo:color="#4A5568" fo:language="en" fo:country="GB"/>
    </style:style>
    <style:style style:name="P181" style:parent-style-name="Título1" style:family="paragraph">
      <style:text-properties fo:language="en" fo:country="GB"/>
    </style:style>
    <style:style style:name="P182" style:parent-style-name="Título2" style:family="paragraph">
      <style:text-properties fo:language="en" fo:country="GB"/>
    </style:style>
    <style:style style:name="P18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84" style:parent-style-name="Fuentedepárrafopredeter." style:family="text">
      <style:text-properties fo:color="#4A5568" fo:language="en" fo:country="GB"/>
    </style:style>
    <style:style style:name="P18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86" style:parent-style-name="Fuentedepárrafopredeter." style:family="text">
      <style:text-properties fo:color="#4A5568" fo:language="en" fo:country="GB"/>
    </style:style>
    <style:style style:name="P18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88" style:parent-style-name="Fuentedepárrafopredeter." style:family="text">
      <style:text-properties fo:color="#4A5568" fo:language="en" fo:country="GB"/>
    </style:style>
    <style:style style:name="P18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90" style:parent-style-name="Fuentedepárrafopredeter." style:family="text">
      <style:text-properties fo:color="#4A5568" fo:language="en" fo:country="GB"/>
    </style:style>
    <style:style style:name="P191" style:parent-style-name="Título2" style:family="paragraph">
      <style:text-properties fo:language="en" fo:country="GB"/>
    </style:style>
    <style:style style:name="P192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93" style:parent-style-name="Fuentedepárrafopredeter." style:family="text">
      <style:text-properties fo:color="#4A5568" fo:language="en" fo:country="GB"/>
    </style:style>
    <style:style style:name="P194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95" style:parent-style-name="Fuentedepárrafopredeter." style:family="text">
      <style:text-properties fo:color="#4A5568" fo:language="en" fo:country="GB"/>
    </style:style>
    <style:style style:name="P196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97" style:parent-style-name="Fuentedepárrafopredeter." style:family="text">
      <style:text-properties fo:color="#4A5568" fo:language="en" fo:country="GB"/>
    </style:style>
    <style:style style:name="P19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199" style:parent-style-name="Fuentedepárrafopredeter." style:family="text">
      <style:text-properties fo:color="#4A5568" fo:language="en" fo:country="GB"/>
    </style:style>
    <style:style style:name="P200" style:parent-style-name="Título2" style:family="paragraph">
      <style:text-properties fo:language="en" fo:country="GB"/>
    </style:style>
    <style:style style:name="P20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02" style:parent-style-name="Fuentedepárrafopredeter." style:family="text">
      <style:text-properties fo:color="#4A5568" fo:language="en" fo:country="GB"/>
    </style:style>
    <style:style style:name="P20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04" style:parent-style-name="Fuentedepárrafopredeter." style:family="text">
      <style:text-properties fo:color="#4A5568" fo:language="en" fo:country="GB"/>
    </style:style>
    <style:style style:name="P20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06" style:parent-style-name="Fuentedepárrafopredeter." style:family="text">
      <style:text-properties fo:color="#4A5568" fo:language="en" fo:country="GB"/>
    </style:style>
    <style:style style:name="P20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08" style:parent-style-name="Fuentedepárrafopredeter." style:family="text">
      <style:text-properties fo:color="#4A5568" fo:language="en" fo:country="GB"/>
    </style:style>
    <style:style style:name="P209" style:parent-style-name="Título1" style:family="paragraph">
      <style:text-properties fo:language="en" fo:country="GB"/>
    </style:style>
    <style:style style:name="P210" style:parent-style-name="Título2" style:family="paragraph">
      <style:text-properties fo:language="en" fo:country="GB"/>
    </style:style>
    <style:style style:name="P21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12" style:parent-style-name="Fuentedepárrafopredeter." style:family="text">
      <style:text-properties fo:color="#4A5568" fo:language="en" fo:country="GB"/>
    </style:style>
    <style:style style:name="P213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14" style:parent-style-name="Fuentedepárrafopredeter." style:family="text">
      <style:text-properties fo:color="#4A5568" fo:language="en" fo:country="GB"/>
    </style:style>
    <style:style style:name="P21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16" style:parent-style-name="Fuentedepárrafopredeter." style:family="text">
      <style:text-properties fo:color="#4A5568" fo:language="en" fo:country="GB"/>
    </style:style>
    <style:style style:name="P21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18" style:parent-style-name="Fuentedepárrafopredeter." style:family="text">
      <style:text-properties fo:color="#4A5568" fo:language="en" fo:country="GB"/>
    </style:style>
    <style:style style:name="P21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20" style:parent-style-name="Fuentedepárrafopredeter." style:family="text">
      <style:text-properties fo:color="#4A5568" fo:language="en" fo:country="GB"/>
    </style:style>
    <style:style style:name="P22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22" style:parent-style-name="Fuentedepárrafopredeter." style:family="text">
      <style:text-properties fo:color="#4A5568" fo:language="en" fo:country="GB"/>
    </style:style>
    <style:style style:name="P223" style:parent-style-name="Título2" style:family="paragraph">
      <style:text-properties fo:language="en" fo:country="GB"/>
    </style:style>
    <style:style style:name="P224" style:parent-style-name="Normal" style:family="paragraph">
      <style:text-properties fo:language="en" fo:country="GB"/>
    </style:style>
    <style:style style:name="P225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26" style:parent-style-name="Fuentedepárrafopredeter." style:family="text">
      <style:text-properties fo:color="#4A5568" fo:language="en" fo:country="GB"/>
    </style:style>
    <style:style style:name="P227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28" style:parent-style-name="Fuentedepárrafopredeter." style:family="text">
      <style:text-properties fo:color="#4A5568" fo:language="en" fo:country="GB"/>
    </style:style>
    <style:style style:name="P229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30" style:parent-style-name="Fuentedepárrafopredeter." style:family="text">
      <style:text-properties fo:color="#4A5568" fo:language="en" fo:country="GB"/>
    </style:style>
    <style:style style:name="P231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32" style:parent-style-name="Fuentedepárrafopredeter." style:family="text">
      <style:text-properties fo:color="#4A5568" fo:language="en" fo:country="GB"/>
    </style:style>
    <style:style style:name="P233" style:parent-style-name="Título2" style:family="paragraph">
      <style:text-properties fo:language="en" fo:country="GB"/>
    </style:style>
    <style:style style:name="P234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35" style:parent-style-name="Fuentedepárrafopredeter." style:family="text">
      <style:text-properties fo:color="#4A5568" fo:language="en" fo:country="GB"/>
    </style:style>
    <style:style style:name="P236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37" style:parent-style-name="Fuentedepárrafopredeter." style:family="text">
      <style:text-properties fo:color="#4A5568" fo:language="en" fo:country="GB"/>
    </style:style>
    <style:style style:name="P238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39" style:parent-style-name="Fuentedepárrafopredeter." style:family="text">
      <style:text-properties fo:color="#4A5568" fo:language="en" fo:country="GB"/>
    </style:style>
    <style:style style:name="P240" style:parent-style-name="Normal" style:family="paragraph">
      <style:paragraph-properties fo:margin-bottom="0.0555in" fo:margin-left="0.5in" fo:text-indent="-0.25in">
        <style:tab-stops/>
      </style:paragraph-properties>
    </style:style>
    <style:style style:name="T241" style:parent-style-name="Fuentedepárrafopredeter." style:family="text">
      <style:text-properties fo:color="#4A5568" fo:language="en" fo:country="GB"/>
    </style:style>
    <style:style style:name="P242" style:parent-style-name="Título1" style:family="paragraph">
      <style:text-properties fo:language="en" fo:country="GB"/>
    </style:style>
    <style:style style:name="P243" style:parent-style-name="Normal" style:family="paragraph">
      <style:text-properties fo:language="en" fo:country="GB"/>
    </style:style>
    <style:style style:name="TableColumn245" style:family="table-column">
      <style:table-column-properties style:column-width="2.1493in"/>
    </style:style>
    <style:style style:name="TableColumn246" style:family="table-column">
      <style:table-column-properties style:column-width="2.0944in"/>
    </style:style>
    <style:style style:name="TableColumn247" style:family="table-column">
      <style:table-column-properties style:column-width="2.0243in"/>
    </style:style>
    <style:style style:name="Table244" style:family="table">
      <style:table-properties style:width="6.268in" style:rel-width="100%" fo:margin-left="0.0069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250" style:parent-style-name="Normal" style:family="paragraph">
      <style:paragraph-properties fo:margin-top="0.0416in" fo:margin-bottom="0.0416in"/>
    </style:style>
    <style:style style:name="T251" style:parent-style-name="Fuentedepárrafopredeter." style:family="text">
      <style:text-properties fo:font-weight="bold" style:font-weight-asian="bold" fo:font-size="10pt" style:font-size-asian="10pt"/>
    </style:style>
    <style:style style:name="TableCell252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253" style:parent-style-name="Normal" style:family="paragraph">
      <style:paragraph-properties fo:margin-top="0.0416in" fo:margin-bottom="0.0416in"/>
    </style:style>
    <style:style style:name="T254" style:parent-style-name="Fuentedepárrafopredeter." style:family="text">
      <style:text-properties fo:font-weight="bold" style:font-weight-asian="bold" fo:font-size="10pt" style:font-size-asian="10pt"/>
    </style:style>
    <style:style style:name="TableCell255" style:family="table-cell">
      <style:table-cell-properties fo:border-top="0.0208in solid #3A5068" fo:border-left="0in solid #FFFFFF" fo:border-bottom="0.0069in solid #D1D5DB" fo:border-right="0in solid #FFFFFF" fo:background-color="#F1F5F9" style:writing-mode="lr-tb" fo:padding-top="0in" fo:padding-left="0.0069in" fo:padding-bottom="0in" fo:padding-right="0.0069in">
        <style:background-fill draw:fill="solid" draw:fill-color="#F1F5F9"/>
      </style:table-cell-properties>
    </style:style>
    <style:style style:name="P256" style:parent-style-name="Normal" style:family="paragraph">
      <style:paragraph-properties fo:margin-top="0.0416in" fo:margin-bottom="0.0416in"/>
    </style:style>
    <style:style style:name="T257" style:parent-style-name="Fuentedepárrafopredeter." style:family="text">
      <style:text-properties fo:font-weight="bold" style:font-weight-asian="bold" fo:font-size="10pt" style:font-size-asian="10pt"/>
    </style:style>
    <style:style style:name="TableRow258" style:family="table-row">
      <style:table-row-properties/>
    </style:style>
    <style:style style:name="TableCell259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margin-top="0.0416in" fo:margin-bottom="0.0416in"/>
    </style:style>
    <style:style style:name="T261" style:parent-style-name="Fuentedepárrafopredeter." style:family="text">
      <style:text-properties fo:color="#4A5568" fo:font-size="10pt" style:font-size-asian="10pt" fo:language="en" fo:country="GB"/>
    </style:style>
    <style:style style:name="TableCell262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margin-top="0.0416in" fo:margin-bottom="0.0416in"/>
    </style:style>
    <style:style style:name="T264" style:parent-style-name="Fuentedepárrafopredeter." style:family="text">
      <style:text-properties fo:color="#4A5568" fo:font-size="10pt" style:font-size-asian="10pt" fo:language="en" fo:country="GB"/>
    </style:style>
    <style:style style:name="TableCell265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66" style:parent-style-name="Normal" style:family="paragraph">
      <style:paragraph-properties fo:margin-top="0.0416in" fo:margin-bottom="0.0416in"/>
    </style:style>
    <style:style style:name="T267" style:parent-style-name="Fuentedepárrafopredeter." style:family="text">
      <style:text-properties fo:color="#4A5568" fo:font-size="10pt" style:font-size-asian="10pt"/>
    </style:style>
    <style:style style:name="TableRow268" style:family="table-row">
      <style:table-row-properties/>
    </style:style>
    <style:style style:name="TableCell269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70" style:parent-style-name="Normal" style:family="paragraph">
      <style:paragraph-properties fo:margin-top="0.0416in" fo:margin-bottom="0.0416in"/>
    </style:style>
    <style:style style:name="T271" style:parent-style-name="Fuentedepárrafopredeter." style:family="text">
      <style:text-properties fo:color="#4A5568" fo:font-size="10pt" style:font-size-asian="10pt" fo:language="en" fo:country="GB"/>
    </style:style>
    <style:style style:name="TableCell272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margin-top="0.0416in" fo:margin-bottom="0.0416in"/>
    </style:style>
    <style:style style:name="T274" style:parent-style-name="Fuentedepárrafopredeter." style:family="text">
      <style:text-properties fo:color="#4A5568" fo:font-size="10pt" style:font-size-asian="10pt"/>
    </style:style>
    <style:style style:name="TableCell275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margin-top="0.0416in" fo:margin-bottom="0.0416in"/>
    </style:style>
    <style:style style:name="T277" style:parent-style-name="Fuentedepárrafopredeter." style:family="text">
      <style:text-properties fo:color="#4A5568" fo:font-size="10pt" style:font-size-asian="10pt"/>
    </style:style>
    <style:style style:name="TableRow278" style:family="table-row">
      <style:table-row-properties/>
    </style:style>
    <style:style style:name="TableCell279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margin-top="0.0416in" fo:margin-bottom="0.0416in"/>
    </style:style>
    <style:style style:name="T281" style:parent-style-name="Fuentedepárrafopredeter." style:family="text">
      <style:text-properties fo:color="#4A5568" fo:font-size="10pt" style:font-size-asian="10pt" fo:language="en" fo:country="GB"/>
    </style:style>
    <style:style style:name="TableCell282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margin-top="0.0416in" fo:margin-bottom="0.0416in"/>
    </style:style>
    <style:style style:name="T284" style:parent-style-name="Fuentedepárrafopredeter." style:family="text">
      <style:text-properties fo:color="#4A5568" fo:font-size="10pt" style:font-size-asian="10pt"/>
    </style:style>
    <style:style style:name="TableCell285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margin-top="0.0416in" fo:margin-bottom="0.0416in"/>
    </style:style>
    <style:style style:name="T287" style:parent-style-name="Fuentedepárrafopredeter." style:family="text">
      <style:text-properties fo:color="#4A5568" fo:font-size="10pt" style:font-size-asian="10pt"/>
    </style:style>
    <style:style style:name="TableRow288" style:family="table-row">
      <style:table-row-properties/>
    </style:style>
    <style:style style:name="TableCell289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margin-top="0.0416in" fo:margin-bottom="0.0416in"/>
    </style:style>
    <style:style style:name="T291" style:parent-style-name="Fuentedepárrafopredeter." style:family="text">
      <style:text-properties fo:color="#4A5568" fo:font-size="10pt" style:font-size-asian="10pt"/>
    </style:style>
    <style:style style:name="TableCell292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margin-top="0.0416in" fo:margin-bottom="0.0416in"/>
    </style:style>
    <style:style style:name="T294" style:parent-style-name="Fuentedepárrafopredeter." style:family="text">
      <style:text-properties fo:color="#4A5568" fo:font-size="10pt" style:font-size-asian="10pt" fo:language="en" fo:country="GB"/>
    </style:style>
    <style:style style:name="TableCell295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margin-top="0.0416in" fo:margin-bottom="0.0416in"/>
    </style:style>
    <style:style style:name="T297" style:parent-style-name="Fuentedepárrafopredeter." style:family="text">
      <style:text-properties fo:color="#4A5568" fo:font-size="10pt" style:font-size-asian="10pt"/>
    </style:style>
    <style:style style:name="TableRow298" style:family="table-row">
      <style:table-row-properties/>
    </style:style>
    <style:style style:name="TableCell299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margin-top="0.0416in" fo:margin-bottom="0.0416in"/>
    </style:style>
    <style:style style:name="T301" style:parent-style-name="Fuentedepárrafopredeter." style:family="text">
      <style:text-properties fo:color="#4A5568" fo:font-size="10pt" style:font-size-asian="10pt"/>
    </style:style>
    <style:style style:name="TableCell302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margin-top="0.0416in" fo:margin-bottom="0.0416in"/>
    </style:style>
    <style:style style:name="T304" style:parent-style-name="Fuentedepárrafopredeter." style:family="text">
      <style:text-properties fo:color="#4A5568" fo:font-size="10pt" style:font-size-asian="10pt"/>
    </style:style>
    <style:style style:name="TableCell305" style:family="table-cell">
      <style:table-cell-properties fo:border-top="0.0069in solid #D1D5DB" fo:border-left="0in solid #FFFFFF" fo:border-bottom="0.0069in solid #D1D5DB" fo:border-right="0in solid #FFFFFF" style:writing-mode="lr-tb" fo:padding-top="0in" fo:padding-left="0.0069in" fo:padding-bottom="0in" fo:padding-right="0.0069in"/>
    </style:style>
    <style:style style:name="P306" style:parent-style-name="Normal" style:family="paragraph">
      <style:paragraph-properties fo:margin-top="0.0416in" fo:margin-bottom="0.0416in"/>
    </style:style>
    <style:style style:name="T307" style:parent-style-name="Fuentedepárrafopredeter." style:family="text">
      <style:text-properties fo:color="#4A5568" fo:font-size="10pt" style:font-size-asian="10pt"/>
    </style:style>
    <style:style style:name="TableRow308" style:family="table-row">
      <style:table-row-properties/>
    </style:style>
    <style:style style:name="TableCell309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margin-top="0.0416in" fo:margin-bottom="0.0416in"/>
    </style:style>
    <style:style style:name="T311" style:parent-style-name="Fuentedepárrafopredeter." style:family="text">
      <style:text-properties fo:color="#4A5568" fo:font-size="10pt" style:font-size-asian="10pt"/>
    </style:style>
    <style:style style:name="TableCell312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margin-top="0.0416in" fo:margin-bottom="0.0416in"/>
    </style:style>
    <style:style style:name="T314" style:parent-style-name="Fuentedepárrafopredeter." style:family="text">
      <style:text-properties fo:color="#4A5568" fo:font-size="10pt" style:font-size-asian="10pt"/>
    </style:style>
    <style:style style:name="TableCell315" style:family="table-cell">
      <style:table-cell-properties fo:border-top="0.0069in solid #D1D5DB" fo:border-left="0in solid #FFFFFF" fo:border-bottom="0.0208in solid #3A5068" fo:border-right="0in solid #FFFFFF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margin-top="0.0416in" fo:margin-bottom="0.0416in"/>
    </style:style>
    <style:style style:name="T317" style:parent-style-name="Fuentedepárrafopredeter." style:family="text">
      <style:text-properties fo:color="#4A5568" fo:font-size="10pt" style:font-size-asian="10pt"/>
    </style:style>
    <style:style style:name="P318" style:parent-style-name="Normal" style:family="paragraph">
      <style:text-properties fo:language="en" fo:country="GB"/>
    </style:style>
    <style:style style:name="P319" style:parent-style-name="Título1" style:family="paragraph">
      <style:text-properties fo:language="en" fo:country="GB"/>
    </style:style>
    <style:style style:name="P320" style:parent-style-name="Normal" style:family="paragraph">
      <style:text-properties fo:language="en" fo:country="GB"/>
    </style:style>
    <style:style style:name="P321" style:parent-style-name="Título2" style:family="paragraph">
      <style:text-properties fo:language="en" fo:country="GB"/>
    </style:style>
    <style:style style:name="P322" style:parent-style-name="Normal" style:family="paragraph">
      <style:text-properties fo:language="en" fo:country="GB"/>
    </style:style>
    <style:style style:name="P323" style:parent-style-name="Normal" style:family="paragraph">
      <style:text-properties fo:language="en" fo:country="GB"/>
    </style:style>
    <style:style style:name="P324" style:parent-style-name="Normal" style:family="paragraph">
      <style:text-properties fo:language="en" fo:country="GB"/>
    </style:style>
    <style:style style:name="P325" style:parent-style-name="Normal" style:family="paragraph">
      <style:text-properties fo:language="en" fo:country="GB"/>
    </style:style>
    <style:style style:name="P326" style:parent-style-name="Normal" style:family="paragraph">
      <style:text-properties fo:language="en" fo:country="GB"/>
    </style:style>
    <style:style style:name="P327" style:parent-style-name="Normal" style:family="paragraph">
      <style:text-properties fo:language="en" fo:country="GB"/>
    </style:style>
    <style:style style:name="P328" style:parent-style-name="Normal" style:family="paragraph">
      <style:text-properties fo:language="en" fo:country="GB"/>
    </style:style>
    <style:style style:name="P329" style:parent-style-name="Normal" style:family="paragraph">
      <style:text-properties fo:language="en" fo:country="GB"/>
    </style:style>
    <style:style style:name="P330" style:parent-style-name="Normal" style:family="paragraph">
      <style:text-properties fo:language="en" fo:country="GB"/>
    </style:style>
    <style:style style:name="P331" style:parent-style-name="Normal" style:family="paragraph">
      <style:text-properties fo:language="en" fo:country="GB"/>
    </style:style>
    <style:style style:name="P332" style:parent-style-name="Normal" style:family="paragraph">
      <style:text-properties fo:language="en" fo:country="GB"/>
    </style:style>
    <style:style style:name="P333" style:parent-style-name="Normal" style:family="paragraph">
      <style:text-properties fo:language="en" fo:country="GB"/>
    </style:style>
    <style:style style:name="P334" style:parent-style-name="Normal" style:family="paragraph">
      <style:text-properties fo:language="en" fo:country="GB"/>
    </style:style>
    <style:style style:name="P335" style:parent-style-name="Normal" style:family="paragraph">
      <style:text-properties fo:language="en" fo:country="GB"/>
    </style:style>
    <style:style style:name="P336" style:parent-style-name="Normal" style:family="paragraph">
      <style:text-properties fo:language="en" fo:country="GB"/>
    </style:style>
    <style:style style:name="P337" style:parent-style-name="Normal" style:family="paragraph">
      <style:text-properties fo:language="en" fo:country="GB"/>
    </style:style>
    <style:style style:name="P338" style:parent-style-name="Normal" style:family="paragraph">
      <style:text-properties fo:language="en" fo:country="GB"/>
    </style:style>
    <style:style style:name="P339" style:parent-style-name="Normal" style:family="paragraph">
      <style:text-properties fo:language="en" fo:country="GB"/>
    </style:style>
    <style:style style:name="P340" style:parent-style-name="Normal" style:family="paragraph"/>
    <style:style style:name="P341" style:parent-style-name="Normal" style:family="paragraph">
      <style:text-properties fo:language="en" fo:country="GB"/>
    </style:style>
    <style:style style:name="P342" style:parent-style-name="Normal" style:family="paragraph">
      <style:text-properties fo:language="en" fo:country="GB"/>
    </style:style>
    <style:style style:name="P343" style:parent-style-name="Normal" style:master-page-name="MP3" style:family="paragraph">
      <style:paragraph-properties fo:break-before="page"/>
    </style:style>
    <style:style style:name="P350" style:parent-style-name="Normal" style:family="paragraph">
      <style:paragraph-properties fo:text-align="center" fo:margin-top="4.8611in"/>
    </style:style>
    <style:style style:name="T351" style:parent-style-name="Fuentedepárrafopredeter." style:family="text">
      <style:text-properties fo:font-weight="bold" style:font-weight-asian="bold" fo:color="#FFFFFF" fo:font-size="22pt" style:font-size-asian="22pt" fo:language="en" fo:country="GB"/>
    </style:style>
    <style:style style:name="P352" style:parent-style-name="Normal" style:family="paragraph">
      <style:paragraph-properties fo:text-align="center" fo:margin-top="0.2777in"/>
    </style:style>
    <style:style style:name="T353" style:parent-style-name="Fuentedepárrafopredeter." style:family="text">
      <style:text-properties fo:color="#C0392B" fo:language="en" fo:country="GB"/>
    </style:style>
    <style:style style:name="P354" style:parent-style-name="Normal" style:family="paragraph">
      <style:paragraph-properties fo:text-align="center" fo:margin-top="0.4166in"/>
    </style:style>
    <style:style style:name="T355" style:parent-style-name="Fuentedepárrafopredeter." style:family="text">
      <style:text-properties fo:color="#8A95A5" fo:font-size="9pt" style:font-size-asian="9pt"/>
    </style:style>
    <style:style style:name="P356" style:parent-style-name="Normal" style:family="paragraph">
      <style:paragraph-properties fo:text-align="center" fo:margin-top="0.1388in"/>
    </style:style>
    <style:style style:name="T357" style:parent-style-name="Fuentedepárrafopredeter." style:family="text">
      <style:text-properties fo:color="#6B7280" fo:font-size="8pt" style:font-size-asian="8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57216" draw:style-name="a0" draw:name="CoverBg" text:anchor-type="paragraph" svg:x="0in" svg:y="0in" svg:width="8.26772in" svg:height="11.69291in" style:rel-width="scale" style:rel-height="scale"><draw:image xlink:href="media/image1.png" xlink:type="simple" xlink:show="embed" xlink:actuate="onLoad"/><svg:title/><svg:desc/></draw:frame></text:p>
      <text:p text:style-name="P2"/>
      <text:p text:style-name="P3"><text:span text:style-name="T4">Technical Audit</text:span></text:p>
      <text:p text:style-name="P5"><text:span text:style-name="T6">Valenze</text:span></text:p>
      <text:p text:style-name="P7"><text:span text:style-name="T8">Conversational Finance Assistant - Telegram Bot</text:span></text:p>
      <text:p text:style-name="P9"><text:span text:style-name="T10">Repository: github.com/crvlinares/Valenze <text:s/>| <text:s/>June 2026</text:span></text:p>
      <text:p text:style-name="P11"><text:span text:style-name="T12">Classification: Critical Security Issues Detected</text:span></text:p>
      <text:soft-page-break/>
      <text:p text:style-name="P13"><text:span text:style-name="T14">Table of Contents</text:span></text:p>
      <text:p text:style-name="P15"><text:span text:style-name="T16">Right-click the TOC and select "Update Field" to refresh page number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DC1"><text:a xlink:href="#_Toc231410788" office:target-frame-name="_top" xlink:show="replace"><text:span text:style-name="Hipervínculo">Executive Summary</text:span><text:tab/>1</text:a></text:p>
          <text:p text:style-name="TDC2"><text:a xlink:href="#_Toc231410789" office:target-frame-name="_top" xlink:show="replace"><text:span text:style-name="Hipervínculo">Audit Scope</text:span><text:tab/>1</text:a></text:p>
          <text:p text:style-name="TDC2"><text:a xlink:href="#_Toc231410790" office:target-frame-name="_top" xlink:show="replace"><text:span text:style-name="Hipervínculo">Overall Assessment</text:span><text:tab/>1</text:a></text:p>
          <text:p text:style-name="TDC1"><text:a xlink:href="#_Toc231410791" office:target-frame-name="_top" xlink:show="replace"><text:span text:style-name="Hipervínculo">1. Security &amp; Privacy Analysis</text:span><text:tab/>1</text:a></text:p>
          <text:p text:style-name="TDC2"><text:a xlink:href="#_Toc231410792" office:target-frame-name="_top" xlink:show="replace"><text:span text:style-name="Hipervínculo">1.1 Hardcoded Secrets (CRITICAL)</text:span><text:tab/>1</text:a></text:p>
          <text:p text:style-name="TDC2"><text:a xlink:href="#_Toc231410793" office:target-frame-name="_top" xlink:show="replace"><text:span text:style-name="Hipervínculo">1.2 Database Security (CRITICAL)</text:span><text:tab/>1</text:a></text:p>
          <text:p text:style-name="TDC2"><text:a xlink:href="#_Toc231410794" office:target-frame-name="_top" xlink:show="replace"><text:span text:style-name="Hipervínculo">1.3 Telegram Bot Security (HIGH)</text:span><text:tab/>1</text:a></text:p>
          <text:p text:style-name="TDC1"><text:a xlink:href="#_Toc231410795" office:target-frame-name="_top" xlink:show="replace"><text:span text:style-name="Hipervínculo">2. Architecture &amp; Code Quality</text:span><text:tab/>1</text:a></text:p>
          <text:p text:style-name="TDC2"><text:a xlink:href="#_Toc231410796" office:target-frame-name="_top" xlink:show="replace"><text:span text:style-name="Hipervínculo">2.1 Code Structure</text:span><text:tab/>1</text:a></text:p>
          <text:p text:style-name="TDC2"><text:a xlink:href="#_Toc231410797" office:target-frame-name="_top" xlink:show="replace"><text:span text:style-name="Hipervínculo">2.2 Parser Logic</text:span><text:tab/>1</text:a></text:p>
          <text:p text:style-name="TDC2"><text:a xlink:href="#_Toc231410798" office:target-frame-name="_top" xlink:show="replace"><text:span text:style-name="Hipervínculo">2.3 Error Handling</text:span><text:tab/>1</text:a></text:p>
          <text:p text:style-name="TDC1"><text:a xlink:href="#_Toc231410799" office:target-frame-name="_top" xlink:show="replace"><text:span text:style-name="Hipervínculo">3. Infrastructure &amp; DevOps</text:span><text:tab/>1</text:a></text:p>
          <text:p text:style-name="TDC2"><text:a xlink:href="#_Toc231410800" office:target-frame-name="_top" xlink:show="replace"><text:span text:style-name="Hipervínculo">3.1 Serverless Architecture</text:span><text:tab/>1</text:a></text:p>
          <text:p text:style-name="TDC2"><text:a xlink:href="#_Toc231410801" office:target-frame-name="_top" xlink:show="replace"><text:span text:style-name="Hipervínculo">3.2 Scalability Concerns</text:span><text:tab/>1</text:a></text:p>
          <text:p text:style-name="TDC2"><text:a xlink:href="#_Toc231410802" office:target-frame-name="_top" xlink:show="replace"><text:span text:style-name="Hipervínculo">3.3 Monitoring &amp; Observability</text:span><text:tab/>1</text:a></text:p>
          <text:p text:style-name="TDC1"><text:a xlink:href="#_Toc231410803" office:target-frame-name="_top" xlink:show="replace"><text:span text:style-name="Hipervínculo">4. Product &amp; Business Model</text:span><text:tab/>1</text:a></text:p>
          <text:p text:style-name="TDC2"><text:a xlink:href="#_Toc231410804" office:target-frame-name="_top" xlink:show="replace"><text:span text:style-name="Hipervínculo">4.1 Current MVP State</text:span><text:tab/>1</text:a></text:p>
          <text:p text:style-name="TDC2"><text:a xlink:href="#_Toc231410805" office:target-frame-name="_top" xlink:show="replace"><text:span text:style-name="Hipervínculo">4.2 Hotel Bot (Demo)</text:span><text:tab/>1</text:a></text:p>
          <text:p text:style-name="TDC2"><text:a xlink:href="#_Toc231410806" office:target-frame-name="_top" xlink:show="replace"><text:span text:style-name="Hipervínculo">4.3 Business Model Assessment</text:span><text:tab/>1</text:a></text:p>
          <text:p text:style-name="TDC1"><text:a xlink:href="#_Toc231410807" office:target-frame-name="_top" xlink:show="replace"><text:span text:style-name="Hipervínculo">5. TECHNICAL_AUDIT.md vs. Reality</text:span><text:tab/>1</text:a></text:p>
          <text:p text:style-name="TDC1"><text:a xlink:href="#_Toc231410808" office:target-frame-name="_top" xlink:show="replace"><text:span text:style-name="Hipervínculo">6. Prioritized Recommendations</text:span><text:tab/>1</text:a></text:p>
          <text:p text:style-name="TDC2"><text:a xlink:href="#_Toc231410809" office:target-frame-name="_top" xlink:show="replace"><text:span text:style-name="Hipervínculo">Immediate (Critical - Do Before Any Deployment)</text:span><text:tab/>1</text:a></text:p>
          <text:p text:style-name="TDC2"><text:a xlink:href="#_Toc231410810" office:target-frame-name="_top" xlink:show="replace"><text:span text:style-name="Hipervínculo">Short-term (1-2 Weeks)</text:span><text:tab/>1</text:a></text:p>
          <text:p text:style-name="TDC2"><text:a xlink:href="#_Toc231410811" office:target-frame-name="_top" xlink:show="replace"><text:span text:style-name="Hipervínculo">Medium-term (1-2 Months)</text:span><text:tab/>1</text:a></text:p>
          <text:p text:style-name="TDC2"><text:a xlink:href="#_Toc231410812" office:target-frame-name="_top" xlink:show="replace"><text:span text:style-name="Hipervínculo">Long-term (3-6 Months)</text:span><text:tab/>1</text:a></text:p>
        </text:index-body>
      </text:table-of-content>
      <text:p text:style-name="Normal"/>
      <text:h text:style-name="P17" text:outline-level="1"><text:bookmark-start text:name="_Toc231410788"/><text:soft-page-break/>Executive Summary<text:bookmark-start text:name="_Toc001"/><text:bookmark-end text:name="_Toc231410788"/><text:bookmark-end text:name="_Toc001"/></text:h>
      <text:p text:style-name="P24">This document presents an independent technical audit of the Valenze project (github.com/crvlinares/Valenze), a Telegram-based conversational finance assistant. The audit was conducted on June 4, 2026, analyzing the complete source code, architecture, security posture, and infrastructure configuration.</text:p>
      <text:p text:style-name="P25"><text:span text:style-name="T26">CRITICAL:</text:span><text:span text:style-name="T27">The project has SEVERE security vulnerabilities that require immediate remediation before any production deployment. Hardcoded API tokens, exposed database credentials, and disabled Row Level Security represent critical risks.</text:span></text:p>
      <text:h text:style-name="P28" text:outline-level="2"><text:bookmark-start text:name="_Toc231410789"/>Audit Scope<text:bookmark-end text:name="_Toc231410789"/></text:h>
      <text:p text:style-name="P29"><text:span text:style-name="T30">• Source code: JavaScript files (botLogic.js, db.js, parser.js, index.js, hotelBotLogic.js)</text:span></text:p>
      <text:p text:style-name="P31"><text:span text:style-name="T32">• Serverless API endpoints: api/webhook.js, api/cron.js, api/hotel-webhook.js</text:span></text:p>
      <text:p text:style-name="P33"><text:span text:style-name="T34">• Database schema: schema.sql</text:span></text:p>
      <text:p text:style-name="P35"><text:span text:style-name="T36">• Infrastructure: vercel.json, package.json</text:span></text:p>
      <text:p text:style-name="P37"><text:span text:style-name="T38">• Documentation: README.md, TECHNICAL_AUDIT.md, Valanze_Brain/</text:span></text:p>
      <text:h text:style-name="Título2" text:outline-level="2"><text:bookmark-start text:name="_Toc231410790"/>Overall Assessment<text:bookmark-end text:name="_Toc231410790"/>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header-rows>
          <table:table-row table:style-name="TableRow43">
            <table:table-cell table:style-name="TableCell44">
              <text:p text:style-name="P45"><text:span text:style-name="T46">Dimension</text:span></text:p>
            </table:table-cell>
            <table:table-cell table:style-name="TableCell47">
              <text:p text:style-name="P48"><text:span text:style-name="T49">Rating</text:span></text:p>
            </table:table-cell>
            <table:table-cell table:style-name="TableCell50">
              <text:p text:style-name="P51"><text:span text:style-name="T52">Key Finding</text:span></text:p>
            </table:table-cell>
          </table:table-row>
        </table:table-header-rows>
        <table:table-row table:style-name="TableRow53">
          <table:table-cell table:style-name="TableCell54">
            <text:p text:style-name="P55"><text:span text:style-name="T56">Security</text:span></text:p>
          </table:table-cell>
          <table:table-cell table:style-name="TableCell57">
            <text:p text:style-name="P58"><text:span text:style-name="T59">CRITICAL</text:span></text:p>
          </table:table-cell>
          <table:table-cell table:style-name="TableCell60">
            <text:p text:style-name="P61"><text:span text:style-name="T62">Hardcoded tokens, disabled RLS</text:span></text:p>
          </table:table-cell>
        </table:table-row>
        <table:table-row table:style-name="TableRow63">
          <table:table-cell table:style-name="TableCell64">
            <text:p text:style-name="P65"><text:span text:style-name="T66">Code Quality</text:span></text:p>
          </table:table-cell>
          <table:table-cell table:style-name="TableCell67">
            <text:p text:style-name="P68"><text:span text:style-name="T69">POOR</text:span></text:p>
          </table:table-cell>
          <table:table-cell table:style-name="TableCell70">
            <text:p text:style-name="P71"><text:span text:style-name="T72">No tests, no linting, no types</text:span></text:p>
          </table:table-cell>
        </table:table-row>
        <table:table-row table:style-name="TableRow73">
          <table:table-cell table:style-name="TableCell74">
            <text:p text:style-name="P75"><text:span text:style-name="T76">Architecture</text:span></text:p>
          </table:table-cell>
          <table:table-cell table:style-name="TableCell77">
            <text:p text:style-name="P78"><text:span text:style-name="T79">FAIR</text:span></text:p>
          </table:table-cell>
          <table:table-cell table:style-name="TableCell80">
            <text:p text:style-name="P81"><text:span text:style-name="T82">Functional but monolithic</text:span></text:p>
          </table:table-cell>
        </table:table-row>
        <table:table-row table:style-name="TableRow83">
          <table:table-cell table:style-name="TableCell84">
            <text:p text:style-name="P85"><text:span text:style-name="T86">Documentation</text:span></text:p>
          </table:table-cell>
          <table:table-cell table:style-name="TableCell87">
            <text:p text:style-name="P88"><text:span text:style-name="T89">GOOD</text:span></text:p>
          </table:table-cell>
          <table:table-cell table:style-name="TableCell90">
            <text:p text:style-name="P91"><text:span text:style-name="T92">Extensive but inaccurate</text:span></text:p>
          </table:table-cell>
        </table:table-row>
        <table:table-row table:style-name="TableRow93">
          <table:table-cell table:style-name="TableCell94">
            <text:p text:style-name="P95"><text:span text:style-name="T96">Scalability</text:span></text:p>
          </table:table-cell>
          <table:table-cell table:style-name="TableCell97">
            <text:p text:style-name="P98"><text:span text:style-name="T99">POOR</text:span></text:p>
          </table:table-cell>
          <table:table-cell table:style-name="TableCell100">
            <text:p text:style-name="P101"><text:span text:style-name="T102">No pagination, no caching</text:span></text:p>
          </table:table-cell>
        </table:table-row>
        <table:table-row table:style-name="TableRow103">
          <table:table-cell table:style-name="TableCell104">
            <text:p text:style-name="P105"><text:span text:style-name="T106">Product Maturity</text:span></text:p>
          </table:table-cell>
          <table:table-cell table:style-name="TableCell107">
            <text:p text:style-name="P108"><text:span text:style-name="T109">EARLY MVP</text:span></text:p>
          </table:table-cell>
          <table:table-cell table:style-name="TableCell110">
            <text:p text:style-name="P111"><text:span text:style-name="T112">Basic CRUD only</text:span></text:p>
          </table:table-cell>
        </table:table-row>
      </table:table>
      <text:h text:style-name="Título1" text:outline-level="1"><text:bookmark-start text:name="_Toc231410791"/>1. Security &amp; Privacy Analysis<text:bookmark-start text:name="_Toc002"/><text:bookmark-end text:name="_Toc231410791"/><text:bookmark-end text:name="_Toc002"/></text:h>
      <text:p text:style-name="P113">The security analysis reveals multiple critical vulnerabilities that expose the application to unauthorized access, data breaches, and potential abuse of Telegram Bot API resources.</text:p>
      <text:h text:style-name="P114" text:outline-level="2"><text:bookmark-start text:name="_Toc231410792"/><text:soft-page-break/>1.1 Hardcoded Secrets (CRITICAL)<text:bookmark-end text:name="_Toc231410792"/></text:h>
      <text:p text:style-name="P115"><text:span text:style-name="T116">CRITICAL:</text:span><text:span text:style-name="T117">A Telegram Bot token is hardcoded in api/hotel-webhook.js: '8521262565:AAG7eoeXZln_ST_mmRku8Fx65zPelcc-2xQ'. This is a production credential committed to version control, permanently exposing it to anyone with repository access. The token must be rotated immediately and removed from git history.</text:span></text:p>
      <text:p text:style-name="P118"><text:span text:style-name="T119">• Cron secret hardcoded as 'valanze2026' in both vercel.json and api/cron.js</text:span></text:p>
      <text:p text:style-name="P120"><text:span text:style-name="T121">• Admin command password '/admin_stats valanze2026' hardcoded in botLogic.js</text:span></text:p>
      <text:p text:style-name="P122"><text:span text:style-name="T123">• No use of environment variables for the hotel bot webhook token</text:span></text:p>
      <text:h text:style-name="P124" text:outline-level="2"><text:bookmark-start text:name="_Toc231410793"/>1.2 Database Security (CRITICAL)<text:bookmark-end text:name="_Toc231410793"/></text:h>
      <text:p text:style-name="P125"><text:span text:style-name="T126">CRITICAL:</text:span><text:span text:style-name="T127">Row Level Security (RLS) is effectively disabled. The schema.sql creates a policy 'Permitir acceso total al bot de Telegram' with USING (true) AND WITH CHECK (true), granting unlimited read/write access to any anonymous user. The documentation even suggests using the service_role key, which bypasses RLS entirely.</text:span></text:p>
      <text:p text:style-name="P128"><text:span text:style-name="T129">• No user authentication beyond telegram_id — any user knowing another's Telegram ID can access their financial data</text:span></text:p>
      <text:p text:style-name="P130"><text:span text:style-name="T131">• The RLS policy allows ALL operations to the anon role without any restrictions</text:span></text:p>
      <text:p text:style-name="P132"><text:span text:style-name="T133">• No rate limiting on database operations</text:span></text:p>
      <text:p text:style-name="P134"><text:span text:style-name="T135">• Financial data (amounts, descriptions, transaction history) stored without encryption</text:span></text:p>
      <text:h text:style-name="P136" text:outline-level="2"><text:bookmark-start text:name="_Toc231410794"/>1.3 Telegram Bot Security (HIGH)<text:bookmark-end text:name="_Toc231410794"/></text:h>
      <text:p text:style-name="P137"><text:span text:style-name="T138">• No webhook secret token validation — the webhook endpoint processes any incoming POST request without verifying it originates from Telegram</text:span></text:p>
      <text:p text:style-name="P139"><text:span text:style-name="T140">• No rate limiting on message processing — susceptible to spam/denial of service</text:span></text:p>
      <text:p text:style-name="P141"><text:span text:style-name="T142">• No input sanitization beyond basic regex parsing — potential for injection attacks</text:span></text:p>
      <text:p text:style-name="P143"><text:span text:style-name="T144">• Admin stats command uses a trivial password that is publicly visible in source code</text:span></text:p>
      <text:h text:style-name="P145" text:outline-level="1"><text:bookmark-start text:name="_Toc231410795"/>2. Architecture &amp; Code Quality<text:bookmark-start text:name="_Toc003"/><text:bookmark-end text:name="_Toc231410795"/><text:bookmark-end text:name="_Toc003"/></text:h>
      <text:p text:style-name="P146">The codebase represents an early-stage MVP with significant architectural and quality concerns that will impede scaling and maintenance.</text:p>
      <text:h text:style-name="P147" text:outline-level="2"><text:bookmark-start text:name="_Toc231410796"/><text:soft-page-break/>2.1 Code Structure<text:bookmark-end text:name="_Toc231410796"/></text:h>
      <text:p text:style-name="P148"><text:span text:style-name="T149">• Monolithic architecture with no separation of concerns — business logic, data access, and presentation mixed in single files</text:span></text:p>
      <text:p text:style-name="P150"><text:span text:style-name="T151">• No test suite whatsoever — zero unit tests, integration tests, or end-to-end tests</text:span></text:p>
      <text:p text:style-name="P152"><text:span text:style-name="T153">• No linting configuration (ESLint) or code formatting (Prettier)</text:span></text:p>
      <text:p text:style-name="P154"><text:span text:style-name="T155">• No TypeScript — JavaScript without static typing increases bug risk in financial calculations</text:span></text:p>
      <text:p text:style-name="P156"><text:span text:style-name="T157">• No CI/CD pipeline configured</text:span></text:p>
      <text:p text:style-name="P158"><text:span text:style-name="T159">• Only 8 commits in repository history — extremely limited development traceability</text:span></text:p>
      <text:h text:style-name="P160" text:outline-level="2"><text:bookmark-start text:name="_Toc231410797"/>2.2 Parser Logic<text:bookmark-end text:name="_Toc231410797"/></text:h>
      <text:p text:style-name="P161">The message parser (parser.js) uses a single regex to extract amounts and descriptions. While functional for simple cases, it has significant limitations:</text:p>
      <text:p text:style-name="P162"><text:span text:style-name="T163">• No support for multiple currencies — hardcoded to Peruvian Sol (S/)</text:span></text:p>
      <text:p text:style-name="P164"><text:span text:style-name="T165">• Limited keyword list for income detection (8 keywords) — not extensible without code changes</text:span></text:p>
      <text:p text:style-name="P166"><text:span text:style-name="T167">• No categorization system — transactions are stored as free-text descriptions</text:span></text:p>
      <text:p text:style-name="P168"><text:span text:style-name="T169">• Edge cases not handled: '2x15 menu', '15.50+10 propina', decimal edge cases</text:span></text:p>
      <text:p text:style-name="P170"><text:span text:style-name="T171">• No machine learning or NLP despite being mentioned in the roadmap</text:span></text:p>
      <text:h text:style-name="P172" text:outline-level="2"><text:bookmark-start text:name="_Toc231410798"/>2.3 Error Handling<text:bookmark-end text:name="_Toc231410798"/></text:h>
      <text:p text:style-name="P173"><text:span text:style-name="T174">• Generic try/catch blocks with console.error only — no structured logging</text:span></text:p>
      <text:p text:style-name="P175"><text:span text:style-name="T176">• No retry mechanisms for failed database operations</text:span></text:p>
      <text:p text:style-name="P177"><text:span text:style-name="T178">• No graceful degradation — if Supabase is down, the bot simply crashes or returns generic error messages</text:span></text:p>
      <text:p text:style-name="P179"><text:span text:style-name="T180">• No error tracking service (Sentry, Rollbar) integrated</text:span></text:p>
      <text:h text:style-name="P181" text:outline-level="1"><text:bookmark-start text:name="_Toc231410799"/>3. Infrastructure &amp; DevOps<text:bookmark-start text:name="_Toc004"/><text:bookmark-end text:name="_Toc231410799"/><text:bookmark-end text:name="_Toc004"/></text:h>
      <text:h text:style-name="P182" text:outline-level="2"><text:bookmark-start text:name="_Toc231410800"/>3.1 Serverless Architecture<text:bookmark-end text:name="_Toc231410800"/></text:h>
      <text:p text:style-name="P183"><text:span text:style-name="T184">• Vercel serverless functions have execution time limits — the cron job iterates over ALL users without pagination, risking timeouts at scale</text:span></text:p>
      <text:soft-page-break/>
      <text:p text:style-name="P185"><text:span text:style-name="T186">• Cold starts on Vercel Hobby tier may cause delayed responses</text:span></text:p>
      <text:p text:style-name="P187"><text:span text:style-name="T188">• No queuing mechanism for high-volume message processing</text:span></text:p>
      <text:p text:style-name="P189"><text:span text:style-name="T190">• Webhook endpoint returns 200 OK before fully processing the message — no delivery guarantees</text:span></text:p>
      <text:h text:style-name="P191" text:outline-level="2"><text:bookmark-start text:name="_Toc231410801"/>3.2 Scalability Concerns<text:bookmark-end text:name="_Toc231410801"/></text:h>
      <text:p text:style-name="P192"><text:span text:style-name="T193">• Database queries lack pagination — getBalance() loads all user transactions into memory</text:span></text:p>
      <text:p text:style-name="P194"><text:span text:style-name="T195">• No caching layer (Redis) for frequently accessed data like user balances</text:span></text:p>
      <text:p text:style-name="P196"><text:span text:style-name="T197">• No connection pooling configuration for Supabase</text:span></text:p>
      <text:p text:style-name="P198"><text:span text:style-name="T199">• The cron job sends messages sequentially in a loop — with 1000+ users, this will exceed serverless timeout limits</text:span></text:p>
      <text:h text:style-name="P200" text:outline-level="2"><text:bookmark-start text:name="_Toc231410802"/>3.3 Monitoring &amp; Observability<text:bookmark-end text:name="_Toc231410802"/></text:h>
      <text:p text:style-name="P201"><text:span text:style-name="T202">• No application monitoring (no APM tools)</text:span></text:p>
      <text:p text:style-name="P203"><text:span text:style-name="T204">• No structured logging — only console.log/console.error</text:span></text:p>
      <text:p text:style-name="P205"><text:span text:style-name="T206">• No alerting for failures or anomalies</text:span></text:p>
      <text:p text:style-name="P207"><text:span text:style-name="T208">• No health check endpoint</text:span></text:p>
      <text:h text:style-name="P209" text:outline-level="1"><text:bookmark-start text:name="_Toc231410803"/>4. Product &amp; Business Model<text:bookmark-start text:name="_Toc005"/><text:bookmark-end text:name="_Toc231410803"/><text:bookmark-end text:name="_Toc005"/></text:h>
      <text:h text:style-name="P210" text:outline-level="2"><text:bookmark-start text:name="_Toc231410804"/>4.1 Current MVP State<text:bookmark-end text:name="_Toc231410804"/></text:h>
      <text:p text:style-name="P211"><text:span text:style-name="T212">• Core functionality: basic transaction logging and balance viewing only</text:span></text:p>
      <text:p text:style-name="P213"><text:span text:style-name="T214">• No categorization or analytics — users cannot see spending patterns</text:span></text:p>
      <text:p text:style-name="P215"><text:span text:style-name="T216">• No data export functionality</text:span></text:p>
      <text:p text:style-name="P217"><text:span text:style-name="T218">• No web dashboard (promised in roadmap but not implemented)</text:span></text:p>
      <text:p text:style-name="P219"><text:span text:style-name="T220">• The '/deshacer' (undo) command is basic — deletes the last transaction without confirmation dialog</text:span></text:p>
      <text:p text:style-name="P221"><text:span text:style-name="T222">• No user onboarding flow beyond a static /start message</text:span></text:p>
      <text:h text:style-name="P223" text:outline-level="2"><text:bookmark-start text:name="_Toc231410805"/><text:soft-page-break/>4.2 Hotel Bot (Demo)<text:bookmark-end text:name="_Toc231410805"/></text:h>
      <text:p text:style-name="P224">The hotelBotLogic.js and api/hotel-webhook.js implement a completely separate demo bot for hostel operations. However:</text:p>
      <text:p text:style-name="P225"><text:span text:style-name="T226">• It is a mock/stub with no real database integration — all responses are hardcoded strings</text:span></text:p>
      <text:p text:style-name="P227"><text:span text:style-name="T228">• Shares the same repository but serves a different use case, creating confusion</text:span></text:p>
      <text:p text:style-name="P229"><text:span text:style-name="T230">• The hardcoded Telegram token in this file is a critical security breach</text:span></text:p>
      <text:p text:style-name="P231"><text:span text:style-name="T232">• No clear path from this demo to a real B2B product</text:span></text:p>
      <text:h text:style-name="P233" text:outline-level="2"><text:bookmark-start text:name="_Toc231410806"/>4.3 Business Model Assessment<text:bookmark-end text:name="_Toc231410806"/></text:h>
      <text:p text:style-name="P234"><text:span text:style-name="T235">• Freemium model proposed ($2.70/month) is optimistic given the extremely basic current feature set</text:span></text:p>
      <text:p text:style-name="P236"><text:span text:style-name="T237">• No payment processing integration exists</text:span></text:p>
      <text:p text:style-name="P238"><text:span text:style-name="T239">• No user tier differentiation implemented</text:span></text:p>
      <text:p text:style-name="P240"><text:span text:style-name="T241">• Competitive landscape (YNAB, Mint, Splitwise, etc.) offers significantly more features for free</text:span></text:p>
      <text:h text:style-name="P242" text:outline-level="1"><text:bookmark-start text:name="_Toc231410807"/>5. TECHNICAL_AUDIT.md vs. Reality<text:bookmark-start text:name="_Toc006"/><text:bookmark-end text:name="_Toc231410807"/><text:bookmark-end text:name="_Toc006"/></text:h>
      <text:p text:style-name="P243">The project's own TECHNICAL_AUDIT.md makes several claims that do not align with the actual codebase:</text:p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header-rows>
          <table:table-row table:style-name="TableRow248">
            <table:table-cell table:style-name="TableCell249">
              <text:p text:style-name="P250"><text:span text:style-name="T251">Claim (TECHNICAL_AUDIT.md)</text:span></text:p>
            </table:table-cell>
            <table:table-cell table:style-name="TableCell252">
              <text:p text:style-name="P253"><text:span text:style-name="T254">Reality</text:span></text:p>
            </table:table-cell>
            <table:table-cell table:style-name="TableCell255">
              <text:p text:style-name="P256"><text:span text:style-name="T257">Assessment</text:span></text:p>
            </table:table-cell>
          </table:table-row>
        </table:table-header-rows>
        <table:table-row table:style-name="TableRow258">
          <table:table-cell table:style-name="TableCell259">
            <text:p text:style-name="P260"><text:span text:style-name="T261">Webhook Authentication validates Telegram secret tokens</text:span></text:p>
          </table:table-cell>
          <table:table-cell table:style-name="TableCell262">
            <text:p text:style-name="P263"><text:span text:style-name="T264">No validation exists in code</text:span></text:p>
          </table:table-cell>
          <table:table-cell table:style-name="TableCell265">
            <text:p text:style-name="P266"><text:span text:style-name="T267">False claim</text:span></text:p>
          </table:table-cell>
        </table:table-row>
        <table:table-row table:style-name="TableRow268">
          <table:table-cell table:style-name="TableCell269">
            <text:p text:style-name="P270"><text:span text:style-name="T271">95% profit margin at 10k DAU</text:span></text:p>
          </table:table-cell>
          <table:table-cell table:style-name="TableCell272">
            <text:p text:style-name="P273"><text:span text:style-name="T274">No revenue model implemented</text:span></text:p>
          </table:table-cell>
          <table:table-cell table:style-name="TableCell275">
            <text:p text:style-name="P276"><text:span text:style-name="T277">Speculative</text:span></text:p>
          </table:table-cell>
        </table:table-row>
        <table:table-row table:style-name="TableRow278">
          <table:table-cell table:style-name="TableCell279">
            <text:p text:style-name="P280"><text:span text:style-name="T281">Stateless compute, no data in memory</text:span></text:p>
          </table:table-cell>
          <table:table-cell table:style-name="TableCell282">
            <text:p text:style-name="P283"><text:span text:style-name="T284">Standard serverless behavior</text:span></text:p>
          </table:table-cell>
          <table:table-cell table:style-name="TableCell285">
            <text:p text:style-name="P286"><text:span text:style-name="T287">Overstated</text:span></text:p>
          </table:table-cell>
        </table:table-row>
        <table:table-row table:style-name="TableRow288">
          <table:table-cell table:style-name="TableCell289">
            <text:p text:style-name="P290"><text:span text:style-name="T291">RLS enabled for security</text:span></text:p>
          </table:table-cell>
          <table:table-cell table:style-name="TableCell292">
            <text:p text:style-name="P293"><text:span text:style-name="T294">RLS policy allows all access</text:span></text:p>
          </table:table-cell>
          <table:table-cell table:style-name="TableCell295">
            <text:p text:style-name="P296"><text:span text:style-name="T297">Misleading</text:span></text:p>
          </table:table-cell>
        </table:table-row>
        <table:table-row table:style-name="TableRow298">
          <table:table-cell table:style-name="TableCell299">
            <text:p text:style-name="P300"><text:span text:style-name="T301">AI Auto-Categorization planned</text:span></text:p>
          </table:table-cell>
          <table:table-cell table:style-name="TableCell302">
            <text:p text:style-name="P303"><text:span text:style-name="T304">Only 8 hardcoded keywords</text:span></text:p>
          </table:table-cell>
          <table:table-cell table:style-name="TableCell305">
            <text:p text:style-name="P306"><text:span text:style-name="T307">Not started</text:span></text:p>
          </table:table-cell>
        </table:table-row>
        <table:table-row table:style-name="TableRow308">
          <table:table-cell table:style-name="TableCell309">
            <text:p text:style-name="P310"><text:span text:style-name="T311">Web Dashboard (Next.js)</text:span></text:p>
          </table:table-cell>
          <table:table-cell table:style-name="TableCell312">
            <text:p text:style-name="P313"><text:span text:style-name="T314">No web code exists</text:span></text:p>
          </table:table-cell>
          <table:table-cell table:style-name="TableCell315">
            <text:p text:style-name="P316"><text:span text:style-name="T317">Not started</text:span></text:p>
          </table:table-cell>
        </table:table-row>
      </table:table>
      <text:p text:style-name="P318">This discrepancy between documented capabilities and actual implementation is concerning for potential investors or technical partners evaluating the project.</text:p>
      <text:h text:style-name="P319" text:outline-level="1"><text:bookmark-start text:name="_Toc231410808"/><text:soft-page-break/>6. Prioritized Recommendations<text:bookmark-start text:name="_Toc007"/><text:bookmark-end text:name="_Toc231410808"/><text:bookmark-end text:name="_Toc007"/></text:h>
      <text:p text:style-name="P320">The following actions are recommended in order of priority:</text:p>
      <text:h text:style-name="P321" text:outline-level="2"><text:bookmark-start text:name="_Toc231410809"/>Immediate (Critical - Do Before Any Deployment)<text:bookmark-end text:name="_Toc231410809"/></text:h>
      <text:list text:style-name="LFO1" text:continue-numbering="true">
        <text:list-item>
          <text:p text:style-name="P322">Rotate the exposed Telegram Bot token immediately and remove it from git history using git-filter-repo or BFG Repo-Cleaner</text:p>
        </text:list-item>
        <text:list-item>
          <text:p text:style-name="P323">Move ALL secrets to environment variables — never commit credentials to version control</text:p>
        </text:list-item>
        <text:list-item>
          <text:p text:style-name="P324">Implement proper Row Level Security policies that restrict access per telegram_id</text:p>
        </text:list-item>
        <text:list-item>
          <text:p text:style-name="P325">Add webhook secret token validation to verify requests originate from Telegram</text:p>
        </text:list-item>
        <text:list-item>
          <text:p text:style-name="P326">Implement rate limiting on all endpoints</text:p>
        </text:list-item>
      </text:list>
      <text:h text:style-name="Título2" text:outline-level="2"><text:bookmark-start text:name="_Toc231410810"/>Short-term (1-2 Weeks)<text:bookmark-end text:name="_Toc231410810"/></text:h>
      <text:list text:style-name="LFO1" text:continue-numbering="true">
        <text:list-item>
          <text:p text:style-name="P327">Add input validation and sanitization for all user messages</text:p>
        </text:list-item>
        <text:list-item>
          <text:p text:style-name="P328">Implement structured logging with a service like Winston or Pino</text:p>
        </text:list-item>
        <text:list-item>
          <text:p text:style-name="P329">Add basic error tracking (Sentry free tier)</text:p>
        </text:list-item>
        <text:list-item>
          <text:p text:style-name="P330">Write unit tests for the parser module (cover edge cases)</text:p>
        </text:list-item>
        <text:list-item>
          <text:p text:style-name="P331">Add ESLint and Prettier configuration for code consistency</text:p>
        </text:list-item>
      </text:list>
      <text:h text:style-name="Título2" text:outline-level="2"><text:bookmark-start text:name="_Toc231410811"/>Medium-term (1-2 Months)<text:bookmark-end text:name="_Toc231410811"/></text:h>
      <text:list text:style-name="LFO1" text:continue-numbering="true">
        <text:list-item>
          <text:p text:style-name="P332">Migrate to TypeScript for type safety, especially for financial calculations</text:p>
        </text:list-item>
        <text:list-item>
          <text:p text:style-name="P333">Implement a transaction categorization system (even rule-based initially)</text:p>
        </text:list-item>
        <text:list-item>
          <text:p text:style-name="P334">Add database query pagination for the cron job and balance queries</text:p>
        </text:list-item>
        <text:list-item>
          <text:p text:style-name="P335">Implement a proper undo mechanism with confirmation and audit trail</text:p>
        </text:list-item>
        <text:list-item>
          <text:p text:style-name="P336">Create the web dashboard (promised in roadmap and TECHNICAL_AUDIT.md)</text:p>
        </text:list-item>
        <text:list-item>
          <text:p text:style-name="P337">Separate the hotel demo into its own repository</text:p>
        </text:list-item>
      </text:list>
      <text:h text:style-name="Título2" text:outline-level="2"><text:bookmark-start text:name="_Toc231410812"/><text:soft-page-break/>Long-term (3-6 Months)<text:bookmark-end text:name="_Toc231410812"/></text:h>
      <text:list text:style-name="LFO1" text:continue-numbering="true">
        <text:list-item>
          <text:p text:style-name="P338">Consider migrating from node-telegram-bot-api to a more modern framework like Telegraf or Grammy</text:p>
        </text:list-item>
        <text:list-item>
          <text:p text:style-name="P339">Implement proper CI/CD pipeline with automated testing</text:p>
        </text:list-item>
        <text:list-item>
          <text:p text:style-name="P340">Add multi-currency support</text:p>
        </text:list-item>
        <text:list-item>
          <text:p text:style-name="P341">Build the premium features (voice notes, Excel export, advanced analytics) before attempting monetization</text:p>
        </text:list-item>
        <text:list-item>
          <text:p text:style-name="P342">Conduct a proper security audit by an external firm before handling real user financial data</text:p>
        </text:list-item>
      </text:list>
      <text:soft-page-break/>
      <text:p text:style-name="P343"><draw:frame draw:z-index="251658240" draw:style-name="a1" draw:name="BackBg" text:anchor-type="paragraph" svg:x="0in" svg:y="0in" svg:width="8.26772in" svg:height="11.69291in" style:rel-width="scale" style:rel-height="scale"><draw:image xlink:href="media/image2.png" xlink:type="simple" xlink:show="embed" xlink:actuate="onLoad"/><svg:title/><svg:desc/></draw:frame></text:p>
      <text:p text:style-name="P350"><text:span text:style-name="T351">Audit Complete</text:span></text:p>
      <text:p text:style-name="P352"><text:span text:style-name="T353">Immediate action required on security findings</text:span></text:p>
      <text:p text:style-name="P354"><text:span text:style-name="T355">Generated: June 4, 2026</text:span></text:p>
      <text:p text:style-name="P356"><text:span text:style-name="T357">Independent Technical Assess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roman" svg:panose-1="0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E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keep-together="always" fo:margin-top="0.4166in" fo:margin-bottom="0.1666in"/>
      <style:text-properties fo:font-weight="bold" style:font-weight-asian="bold" fo:color="#3A5068" fo:font-size="20pt" style:font-size-asian="20pt" fo:hyphenate="false"/>
    </style:style>
    <style:style style:name="Título2" style:display-name="Título 2" style:family="paragraph" style:parent-style-name="Normal" style:default-outline-level="2">
      <style:paragraph-properties fo:keep-with-next="always" fo:keep-together="always" fo:margin-top="0.2777in" fo:margin-bottom="0.1111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default-outline-level="3">
      <style:paragraph-properties fo:keep-with-next="always" fo:keep-together="always" fo:margin-top="0.1944in" fo:margin-bottom="0.0833in"/>
      <style:text-properties fo:font-weight="bold" style:font-weight-asian="bold" fo:color="#4A5568" fo:font-size="12pt" style:font-size-asian="12pt" fo:hyphenate="false"/>
    </style:style>
    <style:style style:name="Normal" style:display-name="Normal" style:family="paragraph">
      <style:paragraph-properties fo:margin-bottom="0.1388in" fo:line-height="130%"/>
      <style:text-properties style:font-name="Calibri" style:font-name-asian="Microsoft YaHei" fo:color="#1A2332" fo:font-size="11pt" style:font-size-asian="11pt" fo:hyphenate="false"/>
    </style:style>
    <style:style style:name="Fuentedepárrafopredeter." style:display-name="Fuente de párrafo predeter." style:family="text"/>
    <style:style style:name="Descripción" style:display-name="Descripción" style:family="paragraph" style:parent-style-name="Normal">
      <style:paragraph-properties fo:text-align="center" fo:margin-top="0.0416in" fo:margin-bottom="0.2222in"/>
      <style:text-properties fo:color="#8A95A5" fo:font-size="10pt" style:font-size-asian="10pt" fo:hyphenate="false"/>
    </style:style>
    <style:style style:name="TDC1" style:display-name="TDC 1" style:family="paragraph" style:parent-style-name="Normal">
      <style:paragraph-properties fo:margin-top="0.1388in" fo:margin-bottom="0.0416in">
        <style:tab-stops>
          <style:tab-stop style:type="right" style:leader-style="dotted" style:leader-text="." style:position="6.493in"/>
        </style:tab-stops>
      </style:paragraph-properties>
      <style:text-properties fo:font-weight="bold" style:font-weight-asian="bold" fo:hyphenate="false"/>
    </style:style>
    <style:style style:name="TDC2" style:display-name="TDC 2" style:family="paragraph" style:parent-style-name="Normal">
      <style:paragraph-properties fo:margin-top="0.0416in" fo:margin-bottom="0.0416in" fo:margin-left="0.25in">
        <style:tab-stops>
          <style:tab-stop style:type="right" style:leader-style="dotted" style:leader-text="." style:position="6.243in"/>
        </style:tab-stops>
      </style:paragraph-properties>
      <style:text-properties fo:color="#4A5568" fo:hyphenate="false"/>
    </style:style>
    <style:style style:name="TDC3" style:display-name="TDC 3" style:family="paragraph" style:parent-style-name="Normal">
      <style:paragraph-properties fo:margin-top="0.0277in" fo:margin-bottom="0.0416in" fo:margin-left="0.5in">
        <style:tab-stops>
          <style:tab-stop style:type="right" style:leader-style="dotted" style:leader-text="." style:position="5.993in"/>
        </style:tab-stops>
      </style:paragraph-properties>
      <style:text-properties fo:color="#4A5568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1A2332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25in" fo:margin-left="1in" fo:margin-bottom="1in" fo:margin-right="1in" style:num-format="1" style:writing-mode="lr-tb">
        <style:footnote-sep style:width="0.007in" style:rel-width="33%" style:color="#1A2332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1A2332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5in"/>
      </style:footer-style>
    </style:page-layout>
    <style:style style:name="P18" style:parent-style-name="Normal" style:family="paragraph">
      <style:paragraph-properties fo:text-align="end"/>
    </style:style>
    <style:style style:name="T19" style:parent-style-name="Fuentedepárrafopredeter." style:family="text">
      <style:text-properties fo:color="#8A95A5" fo:font-size="9pt" style:font-size-asian="9pt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fo:color="#8A95A5" fo:font-size="9pt" style:font-size-asian="9pt"/>
    </style:style>
    <style:style style:name="T22" style:parent-style-name="Fuentedepárrafopredeter." style:family="text">
      <style:text-properties fo:color="#8A95A5" fo:font-size="9pt" style:font-size-asian="9pt"/>
    </style:style>
    <style:style style:name="T23" style:parent-style-name="Fuentedepárrafopredeter." style:family="text">
      <style:text-properties fo:color="#8A95A5" fo:font-size="9pt" style:font-size-asian="9pt"/>
    </style:style>
    <style:page-layout style:name="PL3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1A2332" style:line-style="solid" style:adjustment="left"/>
      </style:page-layout-properties>
    </style:page-layout>
    <style:style style:name="P344" style:parent-style-name="Normal" style:family="paragraph">
      <style:paragraph-properties fo:text-align="end"/>
    </style:style>
    <style:style style:name="T345" style:parent-style-name="Fuentedepárrafopredeter." style:family="text">
      <style:text-properties fo:color="#8A95A5" fo:font-size="9pt" style:font-size-asian="9pt"/>
    </style:style>
    <style:style style:name="P346" style:parent-style-name="Normal" style:family="paragraph">
      <style:paragraph-properties fo:text-align="center"/>
    </style:style>
    <style:style style:name="T347" style:parent-style-name="Fuentedepárrafopredeter." style:family="text">
      <style:text-properties fo:color="#8A95A5" fo:font-size="9pt" style:font-size-asian="9pt"/>
    </style:style>
    <style:style style:name="T348" style:parent-style-name="Fuentedepárrafopredeter." style:family="text">
      <style:text-properties fo:color="#8A95A5" fo:font-size="9pt" style:font-size-asian="9pt"/>
    </style:style>
    <style:style style:name="T349" style:parent-style-name="Fuentedepárrafopredeter." style:family="text">
      <style:text-properties fo:color="#8A95A5" fo:font-size="9pt" style:font-size-asian="9pt"/>
    </style:style>
  </office:automatic-styles>
  <office:master-styles>
    <style:master-page style:name="MPF0" style:page-layout-name="PL0"/>
    <style:master-page style:name="MP1" style:page-layout-name="PL1"/>
    <style:master-page style:name="MP2" style:page-layout-name="PL2">
      <style:header>
        <text:p text:style-name="P18"><text:span text:style-name="T19">Valenze - Technical Audit</text:span></text:p>
      </style:header>
      <style:footer>
        <text:p text:style-name="P20"><text:span text:style-name="T21"><text:page-number text:fixed="false">1</text:page-number></text:span><text:span text:style-name="T22"><text:s/>/<text:s/></text:span><text:span text:style-name="T23"><text:page-count>1</text:page-count></text:span></text:p>
      </style:footer>
    </style:master-page>
    <style:master-page style:name="MP3" style:page-layout-name="PL3">
      <style:header>
        <text:p text:style-name="P344"><text:span text:style-name="T345">Valenze - Technical Audit</text:span></text:p>
      </style:header>
      <style:footer>
        <text:p text:style-name="P346"><text:span text:style-name="T347"><text:page-number text:fixed="false">1</text:page-number></text:span><text:span text:style-name="T348"><text:s/>/<text:s/></text:span><text:span text:style-name="T349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SI</meta:initial-creator>
    <dc:creator>MSI</dc:creator>
    <meta:creation-date>2026-06-04T01:26:00Z</meta:creation-date>
    <dc:date>2026-06-04T01:26:00Z</dc:date>
    <meta:template xlink:href="Normal" xlink:type="simple"/>
    <meta:editing-cycles>2</meta:editing-cycles>
    <meta:editing-duration>PT0S</meta:editing-duration>
    <meta:document-statistic meta:page-count="10" meta:paragraph-count="23" meta:word-count="1846" meta:character-count="11981" meta:row-count="84" meta:non-whitespace-character-count="10158"/>
  </office:meta>
</office:document-meta>
</file>